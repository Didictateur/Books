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fo:font-size="15pt" officeooo:rsid="001627ad" officeooo:paragraph-rsid="001627ad" style:font-size-asian="15pt" style:font-size-complex="15pt"/>
    </style:style>
    <style:style style:name="P2" style:family="paragraph" style:parent-style-name="Standard">
      <style:paragraph-properties fo:text-align="justify" style:justify-single-word="false"/>
      <style:text-properties fo:font-size="15pt" officeooo:rsid="0024c15c" officeooo:paragraph-rsid="0024c15c" style:font-size-asian="15pt" style:font-size-complex="15pt"/>
    </style:style>
    <style:style style:name="P3" style:family="paragraph" style:parent-style-name="Standard">
      <style:paragraph-properties fo:text-align="justify" style:justify-single-word="false"/>
      <style:text-properties fo:font-size="15pt" officeooo:rsid="003469e5" officeooo:paragraph-rsid="003469e5" style:font-size-asian="15pt" style:font-size-complex="15pt"/>
    </style:style>
    <style:style style:name="P4" style:family="paragraph" style:parent-style-name="Standard">
      <style:paragraph-properties fo:text-align="justify" style:justify-single-word="false"/>
      <style:text-properties fo:font-size="15pt" officeooo:rsid="0035bea3" officeooo:paragraph-rsid="0041335b" style:font-size-asian="15pt" style:font-size-complex="15pt"/>
    </style:style>
    <style:style style:name="P5" style:family="paragraph" style:parent-style-name="Standard">
      <style:paragraph-properties fo:text-align="justify" style:justify-single-word="false"/>
      <style:text-properties fo:font-size="15pt" officeooo:rsid="0041335b" officeooo:paragraph-rsid="0041335b" style:font-size-asian="15pt" style:font-size-complex="15pt"/>
    </style:style>
    <style:style style:name="P6" style:family="paragraph" style:parent-style-name="Standard">
      <style:paragraph-properties fo:text-align="justify" style:justify-single-word="false"/>
      <style:text-properties fo:font-size="15pt" officeooo:rsid="00426db7" officeooo:paragraph-rsid="00426db7" style:font-size-asian="15pt" style:font-size-complex="15pt"/>
    </style:style>
    <style:style style:name="P7" style:family="paragraph" style:parent-style-name="Standard">
      <style:paragraph-properties fo:text-align="justify" style:justify-single-word="false"/>
      <style:text-properties fo:font-size="15pt" officeooo:rsid="00454c0a" officeooo:paragraph-rsid="00461d88" style:font-size-asian="15pt" style:font-size-complex="15pt"/>
    </style:style>
    <style:style style:name="P8" style:family="paragraph" style:parent-style-name="Standard">
      <style:paragraph-properties fo:text-align="justify" style:justify-single-word="false"/>
      <style:text-properties fo:font-size="15pt" officeooo:rsid="0050f46b" officeooo:paragraph-rsid="0050f46b" style:font-size-asian="15pt" style:font-size-complex="15pt"/>
    </style:style>
    <style:style style:name="P9" style:family="paragraph" style:parent-style-name="Standard">
      <style:paragraph-properties fo:text-align="justify" style:justify-single-word="false"/>
      <style:text-properties fo:font-size="15pt" officeooo:rsid="0053c6ae" officeooo:paragraph-rsid="0053c6ae" style:font-size-asian="15pt" style:font-size-complex="15pt"/>
    </style:style>
    <style:style style:name="P10" style:family="paragraph" style:parent-style-name="Standard">
      <style:paragraph-properties fo:text-align="justify" style:justify-single-word="false"/>
      <style:text-properties fo:font-size="15pt" officeooo:rsid="0053c6ae" officeooo:paragraph-rsid="0057be09" style:font-size-asian="15pt" style:font-size-complex="15pt"/>
    </style:style>
    <style:style style:name="P11" style:family="paragraph" style:parent-style-name="Standard">
      <style:paragraph-properties fo:text-align="justify" style:justify-single-word="false"/>
      <style:text-properties fo:font-size="15pt" officeooo:rsid="005774b8" officeooo:paragraph-rsid="0057be09" style:font-size-asian="15pt" style:font-size-complex="15pt"/>
    </style:style>
    <style:style style:name="T1" style:family="text">
      <style:text-properties officeooo:rsid="001a2da8"/>
    </style:style>
    <style:style style:name="T2" style:family="text">
      <style:text-properties officeooo:rsid="0016fbb6"/>
    </style:style>
    <style:style style:name="T3" style:family="text">
      <style:text-properties officeooo:rsid="0018dbf4"/>
    </style:style>
    <style:style style:name="T4" style:family="text">
      <style:text-properties officeooo:rsid="00219a77"/>
    </style:style>
    <style:style style:name="T5" style:family="text">
      <style:text-properties officeooo:rsid="002257ba"/>
    </style:style>
    <style:style style:name="T6" style:family="text">
      <style:text-properties officeooo:rsid="001a7b71"/>
    </style:style>
    <style:style style:name="T7" style:family="text">
      <style:text-properties officeooo:rsid="001b133c"/>
    </style:style>
    <style:style style:name="T8" style:family="text">
      <style:text-properties officeooo:rsid="001b5ed1"/>
    </style:style>
    <style:style style:name="T9" style:family="text">
      <style:text-properties officeooo:rsid="00196a56"/>
    </style:style>
    <style:style style:name="T10" style:family="text">
      <style:text-properties officeooo:rsid="001f9d32"/>
    </style:style>
    <style:style style:name="T11" style:family="text">
      <style:text-properties officeooo:rsid="00338477"/>
    </style:style>
    <style:style style:name="T12" style:family="text">
      <style:text-properties officeooo:rsid="002b9576"/>
    </style:style>
    <style:style style:name="T13" style:family="text">
      <style:text-properties officeooo:rsid="002f5831"/>
    </style:style>
    <style:style style:name="T14" style:family="text">
      <style:text-properties officeooo:rsid="002d87ae"/>
    </style:style>
    <style:style style:name="T15" style:family="text">
      <style:text-properties officeooo:rsid="002b2388"/>
    </style:style>
    <style:style style:name="T16" style:family="text">
      <style:text-properties officeooo:rsid="003118ac"/>
    </style:style>
    <style:style style:name="T17" style:family="text">
      <style:text-properties officeooo:rsid="00255175"/>
    </style:style>
    <style:style style:name="T18" style:family="text">
      <style:text-properties officeooo:rsid="002668b9"/>
    </style:style>
    <style:style style:name="T19" style:family="text">
      <style:text-properties officeooo:rsid="0032c0b3"/>
    </style:style>
    <style:style style:name="T20" style:family="text">
      <style:text-properties officeooo:rsid="00282a60"/>
    </style:style>
    <style:style style:name="T21" style:family="text">
      <style:text-properties officeooo:rsid="00292b85"/>
    </style:style>
    <style:style style:name="T22" style:family="text">
      <style:text-properties officeooo:rsid="003ac116"/>
    </style:style>
    <style:style style:name="T23" style:family="text">
      <style:text-properties officeooo:rsid="003d059f"/>
    </style:style>
    <style:style style:name="T24" style:family="text">
      <style:text-properties officeooo:rsid="003c79e3"/>
    </style:style>
    <style:style style:name="T25" style:family="text">
      <style:text-properties officeooo:rsid="003ee42e"/>
    </style:style>
    <style:style style:name="T26" style:family="text">
      <style:text-properties officeooo:rsid="0035bea3"/>
    </style:style>
    <style:style style:name="T27" style:family="text">
      <style:text-properties officeooo:rsid="0036f6c4"/>
    </style:style>
    <style:style style:name="T28" style:family="text">
      <style:text-properties officeooo:rsid="00382b87"/>
    </style:style>
    <style:style style:name="T29" style:family="text">
      <style:text-properties officeooo:rsid="003f7911"/>
    </style:style>
    <style:style style:name="T30" style:family="text">
      <style:text-properties officeooo:rsid="0041335b"/>
    </style:style>
    <style:style style:name="T31" style:family="text">
      <style:text-properties officeooo:rsid="0041ad69"/>
    </style:style>
    <style:style style:name="T32" style:family="text">
      <style:text-properties officeooo:rsid="00426db7"/>
    </style:style>
    <style:style style:name="T33" style:family="text">
      <style:text-properties officeooo:rsid="00438e6e"/>
    </style:style>
    <style:style style:name="T34" style:family="text">
      <style:text-properties officeooo:rsid="00454c0a"/>
    </style:style>
    <style:style style:name="T35" style:family="text">
      <style:text-properties officeooo:rsid="004acb6c"/>
    </style:style>
    <style:style style:name="T36" style:family="text">
      <style:text-properties officeooo:rsid="004e0517"/>
    </style:style>
    <style:style style:name="T37" style:family="text">
      <style:text-properties officeooo:rsid="0048dab1"/>
    </style:style>
    <style:style style:name="T38" style:family="text">
      <style:text-properties officeooo:rsid="004fb6d3"/>
    </style:style>
    <style:style style:name="T39" style:family="text">
      <style:text-properties officeooo:rsid="00461d88"/>
    </style:style>
    <style:style style:name="T40" style:family="text">
      <style:text-properties officeooo:rsid="00512cd5"/>
    </style:style>
    <style:style style:name="T41" style:family="text">
      <style:text-properties officeooo:rsid="0052a037"/>
    </style:style>
    <style:style style:name="T42" style:family="text">
      <style:text-properties officeooo:rsid="0053c6ae"/>
    </style:style>
    <style:style style:name="T43" style:family="text">
      <style:text-properties officeooo:rsid="005b1852"/>
    </style:style>
    <style:style style:name="T44" style:family="text">
      <style:text-properties officeooo:rsid="005b1271"/>
    </style:style>
    <style:style style:name="T45" style:family="text">
      <style:text-properties officeooo:rsid="0064019e"/>
    </style:style>
    <style:style style:name="T46" style:family="text">
      <style:text-properties officeooo:rsid="00542d6c"/>
    </style:style>
    <style:style style:name="T47" style:family="text">
      <style:text-properties officeooo:rsid="005d4d2d"/>
    </style:style>
    <style:style style:name="T48" style:family="text">
      <style:text-properties officeooo:rsid="0062602e"/>
    </style:style>
    <style:style style:name="T49" style:family="text">
      <style:text-properties officeooo:rsid="00647bd3"/>
    </style:style>
    <style:style style:name="T50" style:family="text">
      <style:text-properties officeooo:rsid="00654968"/>
    </style:style>
    <style:style style:name="T51" style:family="text">
      <style:text-properties officeooo:rsid="0066dbe4"/>
    </style:style>
    <style:style style:name="T52" style:family="text">
      <style:text-properties officeooo:rsid="00687261"/>
    </style:style>
    <style:style style:name="T53" style:family="text">
      <style:text-properties officeooo:rsid="006a38fd"/>
    </style:style>
    <style:style style:name="T54" style:family="text">
      <style:text-properties officeooo:rsid="00560496"/>
    </style:style>
    <style:style style:name="T55" style:family="text">
      <style:text-properties officeooo:rsid="005774b8"/>
    </style:style>
    <style:style style:name="T56" style:family="text">
      <style:text-properties officeooo:rsid="006d7f03"/>
    </style:style>
    <style:style style:name="T57" style:family="text">
      <style:text-properties officeooo:rsid="0057be09"/>
    </style:style>
    <style:style style:name="T58" style:family="text">
      <style:text-properties officeooo:rsid="0058ff11"/>
    </style:style>
    <style:style style:name="T59" style:family="text">
      <style:text-properties officeooo:rsid="005f54bd"/>
    </style:style>
    <style:style style:name="T60" style:family="text">
      <style:text-properties officeooo:rsid="0059b350"/>
    </style:style>
    <style:style style:name="T61" style:family="text">
      <style:text-properties officeooo:rsid="005a70c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que matin, Alice se donnait à la même chanson. Le sifflement de la théière accompagnait la radio qui annonçait le mauvais temps. La vie à Venise n’était plus la belle vie d’antan. La pluie, les inondations et les immeubles qui s’effondrent étaient devenus le quotidien de ce nouveau monde dystopique. Au moins, ils étaient protégés des incendies.</text:p>
      <text:p text:style-name="P1">Dehors, les gondoles qui n’avaient pas encore coulé servai<text:span text:style-name="T1">en</text:span>t de nids au<text:span text:style-name="T1">x</text:span> mouettes. Les algues remontaient sur les trottoirs parfumant les rues et transformant le sol en patinoire. <text:span text:style-name="T2">A</text:span>lice <text:span text:style-name="T2">se sentit forc</text:span><text:span text:style-name="T3">ée</text:span><text:span text:style-name="T2"> de </text:span><text:span text:style-name="T4">ranger le parapluie et</text:span> se tenir aux murs d’une main et <text:span text:style-name="T2">de </text:span><text:span text:style-name="T5">se </text:span>boucher <text:span text:style-name="T5">le</text:span> nez de l’autre.</text:p>
      <text:p text:style-name="P1">Arrivé<text:span text:style-name="T6">e</text:span> sur son lieu de travail, <text:span text:style-name="T7">elle tira les stores de son magasin, libérant l’odeur des poissons séchés. Elle traversa la pièce pour rejoindre une petite porte donnant sur des vestiaires sombres. E</text:span>lle se changea <text:span text:style-name="T8">et</text:span> déposa ses affaires <text:span text:style-name="T9">trempées</text:span> dans le casier rongé par la rouille. <text:span text:style-name="T10">À son fond, elle f</text:span><text:span text:style-name="T11">u</text:span><text:span text:style-name="T10">t surprise d’y découvrir une enveloppe</text:span>. Elle <text:span text:style-name="T7">crut naturellement</text:span> à l’erreur, mais son nom inscrit <text:span text:style-name="T7">au</text:span> dos ne faisait aucun doute : elle lui était adressée.</text:p>
      <text:p text:style-name="P1"/>
      <text:p text:style-name="P2">Elle hésita un instant. Cette écriture, elle la connaissait bien, trop bien peut-être. C’était celle de sa sœur, qu’elle n’avait pas revu<text:span text:style-name="T12">e</text:span> depuis qu’elle avait dix ans. Elles <text:span text:style-name="T13">avaient</text:span> été séparées depuis l’incident. Jamais elle ne pourrait oublier ce qu’elle a<text:span text:style-name="T14">vait</text:span> fait ce jour-là. Si elle pouvait revenir en arrière, elle pourrait tout changer. Mais elle ne <text:span text:style-name="T15">pouvait</text:span> pas changer le passé, elle <text:span text:style-name="T15">devait</text:span> en subir les conséquences.</text:p>
      <text:p text:style-name="P2">Elle caressa délicatement l’enveloppe, comme pour essayer de ressentir la peau de sa sœur. Sous ses doigts, les gouttes d’eau formaient des t<text:span text:style-name="T16">a</text:span>ches d’encre effaçant petit à petit les lettres. Alors elle ferma les yeux quelques secondes avant de déchirer le haut de l’enveloppe.</text:p>
      <text:p text:style-name="P2">La photo qu’elle contenait dégageait un parfum délicat <text:span text:style-name="T17">de </text:span><text:span text:style-name="T18">raisin</text:span><text:span text:style-name="T17">, </text:span><text:span text:style-name="T18">illustrant l’image de sa sœur et d’elle dans un champ </text:span><text:span text:style-name="T19">de vignes</text:span><text:span text:style-name="T18">. </text:span><text:span text:style-name="T20">Pourquoi tenait-elle ce souvenir d’enfance </text:span><text:span text:style-name="T21">entre le</text:span><text:span text:style-name="T15">s</text:span><text:span text:style-name="T21"> mains ? Elle n’avait plus qu’une seule certitude : </text:span><text:span text:style-name="T15">elle devait retourner là où tout avait commencé.</text:span></text:p>
      <text:p text:style-name="P2"/>
      <text:p text:style-name="P3">Elle ne réfléchit pas plus longtemps. Elle mit la photo dans sa poche, renfila sa veste de pluie et parti<text:span text:style-name="T22">t</text:span> sans se retourner. Elle sauta dans la première gondole qui flottait suffisamment bien, l<text:span text:style-name="T23">a</text:span> déchargea de ses poissons morts et commença à ramer. Les quelques valeureux qui étaient de sortie la dévisageai<text:span text:style-name="T24">en</text:span>t ou évitai<text:span text:style-name="T24">en</text:span>t son regard. Mais elle <text:span text:style-name="T25">n’</text:span>en prit pas compte. Tout ce qui l’intéressait était de retourner dans sa maison d’enfance. L’idée qu’elle puisse revoir <text:span text:style-name="T26">sa famille la rendait particulièrement heureuse.</text:span></text:p>
      <text:p text:style-name="P4">Au milieu du dégoût des passants, elle fredonnait, l’esprit léger. <text:span text:style-name="T27">Elle remontait avec vivacité la rivière qu’elle connaissait tant. Autour d’elle, les paysages défilaient. </text:span><text:span text:style-name="T28">Des villes qui tomb</text:span><text:span text:style-name="T29">ai</text:span><text:span text:style-name="T28">ent en ruine, des villages abandonnés en passant par les marécages. </text:span><text:span text:style-name="T30">R</text:span><text:span text:style-name="T28">ien ne l’arrêtait.</text:span></text:p>
      <text:p text:style-name="P5"><text:soft-page-break/></text:p>
      <text:p text:style-name="P5">Le fleuve traversa une petite ville abritant quelques rescapés. <text:span text:style-name="T31">Sur ses murs, elle pouvait voir des avis de recherche traçant les contours de son visage. Elle pénétrait un territoire qui lui était hostile. Elle dirigea sa gondole pour la ramener </text:span><text:span text:style-name="T32">au centre du courant, tirant davantage sa capuche se f</text:span><text:span text:style-name="T33">aisant la plus</text:span><text:span text:style-name="T32"> discrète </text:span><text:span text:style-name="T33">possible</text:span><text:span text:style-name="T32">.</text:span></text:p>
      <text:p text:style-name="P6">Les habitants ne lui prêtaient guère attention au début, mais les quelques <text:span text:style-name="T34">passants</text:span> sur les rives remarquèrent sa présence, intrigués <text:span text:style-name="T34">par son comportement</text:span>. <text:span text:style-name="T34">Au bout de plusieurs minutes de silence, </text:span><text:span text:style-name="T35">se sentant </text:span><text:span text:style-name="T34">percée </text:span><text:span text:style-name="T35">de toute part </text:span><text:span text:style-name="T34">par les regards, elle fut reconnue : « C’est elle ! »  cria quelqu’un en la pointant du doigt.</text:span></text:p>
      <text:p text:style-name="P7">Un déferlement de mépris <text:s/>s’abattit sur elle, <text:span text:style-name="T36">tandis qu’on la huait de toutes les directions</text:span>. Les parents tiraient les enfants pour ne pas qu’ils la voi<text:span text:style-name="T37">en</text:span>t, les commerçants quittaient leur magasin pour se rejoindre au mouvement. On commença à la caillasser. De toute<text:span text:style-name="T38">s</text:span> ses forces, elle essayait de s’extirper de cette situation, <text:span text:style-name="T39">mais les cailloux arrivaient à destination. Elle se protégeait avec ses bras comme elle le pouvait, mais la dureté des chocs la recouvrait de bleus. Sa tête sifflait, son corps saignait et ses muscles brûlaient, mais elle avait réussi à s’enfuir.</text:span></text:p>
      <text:p text:style-name="P7"/>
      <text:p text:style-name="P8">Lorsqu’elle arriva à la frontière du champ, hésitante, elle vit au loin sa sœur, assise sous un parasol, <text:span text:style-name="T40">en train de lire. Elle avait du mal à se concentrer à cause de l’odeur </text:span><text:span text:style-name="T41">nauséabonde</text:span><text:span text:style-name="T40">, mais elle était là à l’attendre. </text:span><text:span text:style-name="T42">Alors elle se précipita vers elle en courant. Quand </text:span><text:span text:style-name="T43">sa sœur</text:span><text:span text:style-name="T42"> entendit les pas se rapprocher d’elle, elle leva le nez de sa lecture. Elle faillit ne </text:span><text:span text:style-name="T44">pas</text:span><text:span text:style-name="T42"> la reconnaître.</text:span></text:p>
      <text:p text:style-name="P9">Elles se jetèrent dans les bras. Alice pleurait toute<text:span text:style-name="T45">s</text:span> les larmes de son corps, <text:span text:style-name="T46">écrasant presque les os de sa sœur, de peur qu’elles ne soient séparées de nouveau. « Tu as dû en baver » lança-t-elle à Alice en voyant toutes ses blessures. Mais ce n’était que de </text:span><text:span text:style-name="T47">petites</text:span><text:span text:style-name="T46"> inconvenances face à leur</text:span><text:span text:style-name="T48">s</text:span><text:span text:style-name="T46"> retrouvaille</text:span><text:span text:style-name="T48">s</text:span><text:span text:style-name="T46">.</text:span></text:p>
      <text:p text:style-name="P10">« <text:span text:style-name="T46">Papa t’a enfin pardonné ». Cette nouvelle rempli</text:span><text:span text:style-name="T49">t</text:span><text:span text:style-name="T46"> le cœur d’Alice de bonheur. Elle </text:span><text:span text:style-name="T50">ne prêtait pas attention</text:span><text:span text:style-name="T46"> </text:span><text:span text:style-name="T51">au</text:span><text:span text:style-name="T46"> regard des autre</text:span><text:span text:style-name="T52">s, </text:span><text:span text:style-name="T53">et ça ne la gênait pas d’être détestée par le reste de la planète</text:span><text:span text:style-name="T54">. Mais elle ne pouvait jamais combler </text:span><text:span text:style-name="T55">la</text:span><text:span text:style-name="T54"> déchirure </text:span><text:span text:style-name="T55">de son père l’ayant chassé</text:span><text:span text:style-name="T56">e</text:span><text:span text:style-name="T55">.</text:span></text:p>
      <text:p text:style-name="P11">Elle n’était <text:span text:style-name="T57">alors </text:span>qu’une enfant <text:span text:style-name="T58">voulant</text:span> régler la faim dans le monde. Elle avait toujours regretté d’avoir <text:span text:style-name="T59">réalisé</text:span> <text:span text:style-name="T60">ce jour-là le vœu de faire pleuvoir des poissons </text:span><text:span text:style-name="T61">sur la surface de la Terr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16T18:05:53.822878950</meta:creation-date>
    <dc:date>2026-06-16T20:47:19.665919416</dc:date>
    <meta:editing-duration>PT1H26M4S</meta:editing-duration>
    <meta:editing-cycles>79</meta:editing-cycles>
    <meta:generator>LibreOffice/26.2.4.2$Linux_X86_64 LibreOffice_project/620$Build-2</meta:generator>
    <meta:document-statistic meta:table-count="0" meta:image-count="0" meta:object-count="0" meta:page-count="2" meta:paragraph-count="15" meta:word-count="877" meta:character-count="5279" meta:non-whitespace-character-count="4415"/>
  </office:meta>
</office:document-meta>
</file>